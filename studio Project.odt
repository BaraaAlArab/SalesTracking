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3"/>
    <style:style style:name="P5" style:family="paragraph" style:parent-style-name="Text_20_body" style:list-style-name="L4">
      <style:paragraph-properties fo:margin-top="0in" fo:margin-bottom="0in" style:contextual-spacing="false"/>
    </style:style>
    <style:style style:name="P6" style:family="paragraph" style:parent-style-name="Text_20_body" style:list-style-name="L4"/>
    <style:style style:name="P7" style:family="paragraph" style:parent-style-name="Text_20_body" style:list-style-name="L5">
      <style:paragraph-properties fo:margin-top="0in" fo:margin-bottom="0in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>
      <style:paragraph-properties fo:margin-top="0in" fo:margin-bottom="0in" style:contextual-spacing="false"/>
    </style:style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T1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2" text:outline-level="2">What else you can add</text:h>
      <text:p text:style-name="Text_20_body">Your page is a great start. Here are some useful additions that make it more complete and more interactive:</text:p>
      <text:h text:style-name="Heading_20_3" text:outline-level="3">1. Improve the calculator</text:h>
      <text:list text:style-name="L1">
        <text:list-item>
          <text:p text:style-name="P1">Show <text:span text:style-name="T1">Daily Sales Target</text:span> comparison: “Met target” / “Below target” and by how much.</text:p>
        </text:list-item>
        <text:list-item>
          <text:p text:style-name="P1">Add a “commission rate” input so users can change the percentage.</text:p>
        </text:list-item>
        <text:list-item>
          <text:p text:style-name="P1">Add separate totals for <text:span text:style-name="T1">morning</text:span> and <text:span text:style-name="T1">night</text:span>, plus <text:span text:style-name="T1">grand total</text:span>.</text:p>
        </text:list-item>
      </text:list>
      <text:h text:style-name="Heading_20_3" text:outline-level="3" text:is-list-header="true">2. Make the sales history smarter</text:h>
      <text:list text:style-name="L2">
        <text:list-item>
          <text:p text:style-name="P2">Allow removing a history row</text:p>
        </text:list-item>
        <text:list-item>
          <text:p text:style-name="P2">Allow editing a row after adding it</text:p>
        </text:list-item>
        <text:list-item>
          <text:p text:style-name="P3">Add filters:</text:p>
          <text:list>
            <text:list-item>
              <text:p text:style-name="P2">by date</text:p>
            </text:list-item>
            <text:list-item>
              <text:p text:style-name="P2">by product name</text:p>
            </text:list-item>
            <text:list-item>
              <text:p text:style-name="P2">by price range</text:p>
            </text:list-item>
          </text:list>
        </text:list-item>
        <text:list-item>
          <text:p text:style-name="P3">Add totals below the table:</text:p>
          <text:list>
            <text:list-item>
              <text:p text:style-name="P2">total revenue</text:p>
            </text:list-item>
            <text:list-item>
              <text:p text:style-name="P2">total items sold</text:p>
            </text:list-item>
            <text:list-item>
              <text:p text:style-name="P2">average sale</text:p>
            </text:list-item>
          </text:list>
        </text:list-item>
      </text:list>
      <text:h text:style-name="Heading_20_3" text:outline-level="3" text:is-list-header="true">3. Persist data</text:h>
      <text:list text:style-name="L3">
        <text:list-item>
          <text:p text:style-name="P4">Save sales history to <text:span text:style-name="T1">localStorage</text:span></text:p>
        </text:list-item>
        <text:list-item>
          <text:p text:style-name="P4">Restore it when the page reloads</text:p>
        </text:list-item>
        <text:list-item>
          <text:p text:style-name="P4">Save theme preference if you add a dark/light switch</text:p>
        </text:list-item>
      </text:list>
      <text:h text:style-name="Heading_20_3" text:outline-level="3" text:is-list-header="true">4. Add a better UX for buttons</text:h>
      <text:list text:style-name="L4">
        <text:list-item>
          <text:p text:style-name="P5">Give <text:span text:style-name="T1">voidBtn</text:span> a real action:</text:p>
          <text:list>
            <text:list-item>
              <text:p text:style-name="P6">clear current inputs</text:p>
            </text:list-item>
            <text:list-item>
              <text:p text:style-name="P6">or remove the last sale entry</text:p>
            </text:list-item>
          </text:list>
        </text:list-item>
        <text:list-item>
          <text:p text:style-name="P6">Use <text:span text:style-name="T1">type="button"</text:span> on your buttons so they don’t accidentally submit a form</text:p>
        </text:list-item>
        <text:list-item>
          <text:p text:style-name="P6">Show inline error messages instead of <text:span text:style-name="T1">alert(...)</text:span></text:p>
        </text:list-item>
      </text:list>
      <text:h text:style-name="Heading_20_3" text:outline-level="3" text:is-list-header="true"><text:soft-page-break/>5. Enhance the portfolio / page content</text:h>
      <text:list text:style-name="L5">
        <text:list-item>
          <text:p text:style-name="P7">Add a real portfolio section:</text:p>
          <text:list>
            <text:list-item>
              <text:p text:style-name="P8">projects</text:p>
            </text:list-item>
            <text:list-item>
              <text:p text:style-name="P8">skills</text:p>
            </text:list-item>
            <text:list-item>
              <text:p text:style-name="P8">education</text:p>
            </text:list-item>
            <text:list-item>
              <text:p text:style-name="P8">experience</text:p>
            </text:list-item>
          </text:list>
        </text:list-item>
        <text:list-item>
          <text:p text:style-name="P7">Add a contact form with:</text:p>
          <text:list>
            <text:list-item>
              <text:p text:style-name="P8">name</text:p>
            </text:list-item>
            <text:list-item>
              <text:p text:style-name="P8">email</text:p>
            </text:list-item>
            <text:list-item>
              <text:p text:style-name="P8">message</text:p>
            </text:list-item>
          </text:list>
        </text:list-item>
        <text:list-item>
          <text:p text:style-name="P8">Add a “hero” section or welcome banner</text:p>
        </text:list-item>
      </text:list>
      <text:h text:style-name="Heading_20_3" text:outline-level="3" text:is-list-header="true">6. Add visual polish</text:h>
      <text:list text:style-name="L6">
        <text:list-item>
          <text:p text:style-name="P9">Add a sticky navbar with section links</text:p>
        </text:list-item>
        <text:list-item>
          <text:p text:style-name="P9">Add a mobile menu for smaller screens</text:p>
        </text:list-item>
        <text:list-item>
          <text:p text:style-name="P9">Add hover effects, icons, or cards</text:p>
        </text:list-item>
        <text:list-item>
          <text:p text:style-name="P9">Add a theme toggle: dark / light</text:p>
        </text:list-item>
      </text:list>
      <text:h text:style-name="Heading_20_3" text:outline-level="3" text:is-list-header="true">7. Add data visualization</text:h>
      <text:list text:style-name="L7">
        <text:list-item>
          <text:p text:style-name="P10">Use a chart library or simple HTML/CSS charts to show:</text:p>
          <text:list>
            <text:list-item>
              <text:p text:style-name="P11">sales by day</text:p>
            </text:list-item>
            <text:list-item>
              <text:p text:style-name="P11">best-selling products</text:p>
            </text:list-item>
            <text:list-item>
              <text:p text:style-name="P11">revenue breakdown</text:p>
            </text:list-item>
          </text:list>
        </text:list-item>
      </text:list>
      <text:h text:style-name="Heading_20_3" text:outline-level="3" text:is-list-header="true">8. Fix / improve current JS</text:h>
      <text:list text:style-name="L8">
        <text:list-item>
          <text:p text:style-name="P12">Remove duplicate event listener for <text:span text:style-name="T1">priceInput</text:span></text:p>
        </text:list-item>
        <text:list-item>
          <text:p text:style-name="P12">Add logic for <text:span text:style-name="T1">voidBtn</text:span></text:p>
        </text:list-item>
        <text:list-item>
          <text:p text:style-name="P12">Use a single result area for messages and better formatting</text:p>
        </text:list-item>
      </text:list>
      <text:p text:style-name="Quotations">If you want, I can make one of these upgrades for you now — for example: calculating totals + showing sales analytics, or adding history persistence with <text:span text:style-name="T1">localStorage</text:span>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8T21:12:22.047638300</meta:creation-date>
    <dc:date>2026-06-08T00:44:34.614188400</dc:date>
    <meta:editing-duration>PT1M50S</meta:editing-duration>
    <meta:editing-cycles>2</meta:editing-cycles>
    <meta:generator>LibreOffice/26.2.3.2$Windows_X86_64 LibreOffice_project/70e089b17412e4cb7773e41413306b17a2328c34</meta:generator>
    <meta:document-statistic meta:table-count="0" meta:image-count="0" meta:object-count="0" meta:page-count="2" meta:paragraph-count="53" meta:word-count="344" meta:character-count="1764" meta:non-whitespace-character-count="1514"/>
  </office:meta>
</office:document-meta>
</file>